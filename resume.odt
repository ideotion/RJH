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Title">Your Name</text:p>
      <text:h text:style-name="Heading1" text:outline-level="1">SUMMARY</text:h>
      <text:p text:style-name="Body">Ops leader.</text:p>
      <text:h text:style-name="Heading1" text:outline-level="1">EXPERIENCE</text:h>
      <text:list text:style-name="Bullets">
        <text:list-item>
          <text:p text:style-name="Body">Built teams</text:p>
        </text:list-item>
        <text:list-item>
          <text:p text:style-name="Body">Ran P&amp;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default-style style:family="paragraph">
      <style:text-properties fo:font-size="11pt" fo:font-family="Arial"/>
    </style:default-style>
    <style:style style:name="Standard" style:family="paragraph"/>
    <style:style style:name="Title" style:family="paragraph" style:parent-style-name="Standard">
      <style:paragraph-properties fo:text-align="center" fo:margin-bottom="0.05in"/>
      <style:text-properties fo:font-size="22pt" fo:font-weight="bold"/>
    </style:style>
    <style:style style:name="Contact" style:family="paragraph" style:parent-style-name="Standard">
      <style:paragraph-properties fo:text-align="center" fo:margin-bottom="0.2in"/>
      <style:text-properties fo:font-size="10pt" fo:color="#555555"/>
    </style:style>
    <style:style style:name="Meta" style:family="paragraph" style:parent-style-name="Standard">
      <style:paragraph-properties fo:text-align="right" fo:margin-bottom="0.12in"/>
      <style:text-properties fo:font-size="10pt" fo:color="#555555"/>
    </style:style>
    <style:style style:name="Heading1" style:family="paragraph" style:parent-style-name="Standard">
      <style:paragraph-properties fo:margin-top="0.16in" fo:margin-bottom="0.04in" fo:border-bottom="0.5pt solid #999999" fo:padding-bottom="0.02in"/>
      <style:text-properties fo:font-size="13pt" fo:font-weight="bold" fo:color="#222222"/>
    </style:style>
    <style:style style:name="Body" style:family="paragraph" style:parent-style-name="Standard">
      <style:paragraph-properties fo:margin-bottom="0.06in" fo:line-height="115%"/>
    </style:style>
    <text:list-style style:name="Bullets">
      <text:list-level-style-bullet text:level="1" text:bullet-char="•">
        <style:list-level-properties text:space-before="0.2in" text:min-label-width="0.15in"/>
      </text:list-level-style-bullet>
    </text:list-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RJH - Reverse Job Hunting</meta:generator>
    <dc:title>Your Name - Resume</dc:title>
    <meta:creation-date>2026-06-22T10:01:09</meta:creation-date>
  </office:meta>
</office:document-meta>
</file>